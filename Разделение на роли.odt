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bg" fo:country="BG"/>
    </style:style>
    <style:style style:name="T3" style:parent-style-name="DefaultParagraphFont" style:family="text">
      <style:text-properties fo:language="bg" fo:country="BG"/>
    </style:style>
    <style:style style:name="T4" style:parent-style-name="DefaultParagraphFont" style:family="text">
      <style:text-properties fo:language="bg" fo:country="BG"/>
    </style:style>
    <style:style style:name="T5" style:parent-style-name="DefaultParagraphFont" style:family="text">
      <style:text-properties fo:language="bg" fo:country="BG"/>
    </style:style>
    <style:style style:name="T6" style:parent-style-name="DefaultParagraphFont" style:family="text">
      <style:text-properties fo:language="bg" fo:country="BG"/>
    </style:style>
    <style:style style:name="T7" style:parent-style-name="DefaultParagraphFont" style:family="text">
      <style:text-properties fo:language="bg" fo:country="BG"/>
    </style:style>
    <style:style style:name="T8" style:parent-style-name="DefaultParagraphFont" style:family="text">
      <style:text-properties fo:language="bg" fo:country="BG"/>
    </style:style>
    <style:style style:name="T9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<text:span text:style-name="T2">Габриела –<text:s/></text:span>unit testing</text:p>
      <text:p text:style-name="Normal"><text:span text:style-name="T3">Кристияна –<text:s/></text:span>data base</text:p>
      <text:p text:style-name="Normal"><text:span text:style-name="T4">Теодора<text:s/></text:span>– backend</text:p>
      <text:p text:style-name="Normal"><text:span text:style-name="T5">Веселина<text:s/></text:span>– Question and Answer</text:p>
      <text:p text:style-name="Normal"><text:span text:style-name="T6">Натали –<text:s/></text:span>Design<text:s/></text:p>
      <text:p text:style-name="Normal"><text:span text:style-name="T7">Калина –<text:s/></text:span>scrum trainer</text:p>
      <text:p text:style-name="Normal"><text:span text:style-name="T8">Кристиян –<text:s/></text:span>front end</text:p>
      <text:p text:style-name="Normal"><text:span text:style-name="T9">Александър –<text:s/></text:span>project own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ksandar Stanev</meta:initial-creator>
    <dc:creator>Aleksandar Stanev</dc:creator>
    <meta:creation-date>2026-05-15T07:55:00Z</meta:creation-date>
    <dc:date>2026-05-15T07:55:00Z</dc:date>
    <meta:template xlink:href="Normal.dotm" xlink:type="simple"/>
    <meta:editing-cycles>2</meta:editing-cycles>
    <meta:editing-duration>PT0S</meta:editing-duration>
    <meta:document-statistic meta:page-count="1" meta:paragraph-count="8" meta:word-count="23" meta:character-count="175" meta:row-count="8" meta:non-whitespace-character-count="151"/>
  </office:meta>
</office:document-meta>
</file>